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aafc" officeooo:paragraph-rsid="000baafc"/>
    </style:style>
    <style:style style:name="P2" style:family="paragraph" style:parent-style-name="Standard">
      <style:paragraph-properties>
        <style:tab-stops>
          <style:tab-stop style:position="13.176cm"/>
        </style:tab-stops>
      </style:paragraph-properties>
      <style:text-properties officeooo:rsid="000baafc" officeooo:paragraph-rsid="000baafc"/>
    </style:style>
    <style:style style:name="T1" style:family="text">
      <style:text-properties officeooo:rsid="000c0b7e"/>
    </style:style>
    <style:style style:name="T2" style:family="text">
      <style:text-properties officeooo:rsid="000dfd5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inking in this way !<text:line-break/><text:line-break/>First of all , <text:line-break/>Remember the time where cain is offering his gift to God in the Genesis and same Hebel offering his gift.<text:line-break/>Here , Cain and Hebel offered with Submission of Gods will ? Did they both had offered ? <text:line-break/>Answer is only Hebel is offered and not the Cain.<text:line-break/><text:line-break/>Why cain is having issue ? <text:line-break/><text:line-break/>If we read clearly there it shown that , Cain offered the Fruit and what is this Fruit ? <text:line-break/>This fruit is so clear he offered the Child of the Cain and people think a normal fruit but if we think clearly that is baby or its a Human baby .<text:line-break/>And so on ...We can understand the cain heart how much he is making his heart into a stone.<text:line-break/>That’s why god had warned many times in his words , donot stone your heart.<text:line-break/>Donot Stone your Heart.<text:line-break/><text:line-break/>Always representing this only through the bible.<text:line-break/>Take movement and be with that heart , he represented all over until Start to End.<text:line-break/>Gensis to Revelation.<text:line-break/>As a complete level of information it is showing .<text:line-break/><text:line-break/>Cain is offered same baby and Hebel offered same another baby of sheep animal as sacrifice.</text:p>
      <text:p text:style-name="P1">For the sin commited , hebel surrender to god and scarifice the Sheep ( lamb ) <text:line-break/>This is seen as good thing to god.<text:line-break/><text:line-break/>Cain offered human baby.<text:line-break/><text:line-break/>But if you see this same scene is repeated with Abram where he went and tried offering the human baby , god had given the lamb as a sacrifice instead human baby.</text:p>
      <text:p text:style-name="P2"><text:line-break/><text:span text:style-name="T1">So Here the intentio towards god is matters to YHWH this is what it was shown .!<text:line-break/><text:line-break/><text:line-break/>The</text:span><text:span text:style-name="T2"> SAME INTENTION IS NOW DIVIDED INTO !<text:line-break/><text:line-break/>Cain AND Hebel <text:line-break/><text:line-break/>Cain is where builded his own city and world and where as Light and serving in his own way.<text:line-break/>Hebel is on the pace of god’s own plan!<text:line-break/>Abel is never been back down and been went lost definetly been always with god only.<text:line-break/>Abel never goes backfire.<text:line-break/>Abel is into reality.<text:line-break/><text:line-break/>Cain is creating on his own!<text:line-break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6-01T13:08:25.999383165</meta:creation-date>
    <dc:date>2026-06-01T22:54:03.713594179</dc:date>
    <meta:editing-duration>PT15M52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1" meta:paragraph-count="3" meta:word-count="350" meta:character-count="1784" meta:non-whitespace-character-count="1417"/>
  </office:meta>
</office:document-meta>
</file>